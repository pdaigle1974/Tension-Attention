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9b48" officeooo:paragraph-rsid="00139b48"/>
    </style:style>
    <style:style style:name="P2" style:family="paragraph" style:parent-style-name="Standard">
      <style:text-properties officeooo:rsid="001432c5" officeooo:paragraph-rsid="001432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ici ce que je désire :</text:p>
      <text:p text:style-name="P1">je veux une app pour m’aider à suivre, documenter et partager mes lectures de tension artérielle. Les champs de l’app doivent correspondre à ceux qui se trouvent dans la photo qui s’appelle gabarit_tension. Les informations déjà inscrites dans le haut du gabarit doivent également se retrouver dans l’app. </text:p>
      <text:p text:style-name="P1">Pour entrer les informations de lecture, idéalement, je prendrais une photo de la lecture du tensiomètre, et l’app entrerait directement les données dans les champs appropriés. La photo exemple_lecture_tensiometre représente un exemple de la photo que je prendrais. De plus, pour les champs date et heure, l’app inscrira automatiquement la date et l’heure que je soumet la photo, considérant que je suis au Québec, donc à l’heure de l’est. </text:p>
      <text:p text:style-name="P1">Je dois pouvoir télécharger le résultat des lecture (donc le gabarit avec toutes les informations de départ ainsi que les résultats des différentes lectures) en format PDF par courriel. Le gabarit comporte également une cible à viser, soit 130/80. j’aimerais que les résultats viennent avec un code de couleur (vert, jaune, rouge) indiquant les résultat vs la cible. 130/80 ou moins = vert. </text:p>
      <text:p text:style-name="P2">Je veux pouvoir utiliser cette app sur mon iphone.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30T15:06:21.736396870</meta:creation-date>
    <meta:generator>LibreOffice/24.2.7.2$Linux_X86_64 LibreOffice_project/420$Build-2</meta:generator>
    <dc:date>2026-05-30T15:19:16.308436124</dc:date>
    <meta:editing-duration>PT1M8S</meta:editing-duration>
    <meta:editing-cycles>1</meta:editing-cycles>
    <meta:document-statistic meta:table-count="0" meta:image-count="0" meta:object-count="0" meta:page-count="1" meta:paragraph-count="5" meta:word-count="195" meta:character-count="1212" meta:non-whitespace-character-count="1018"/>
  </office:meta>
</office:document-meta>
</file>